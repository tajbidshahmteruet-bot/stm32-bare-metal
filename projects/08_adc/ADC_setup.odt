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5000001F9500689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9acd"/>
    </style:style>
    <style:style style:name="P2" style:family="paragraph" style:parent-style-name="Standard">
      <style:paragraph-properties fo:margin-top="0in" fo:margin-bottom="0.1965in" style:contextual-spacing="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2453ad"/>
    </style:style>
    <style:style style:name="P5" style:family="paragraph" style:parent-style-name="Standard">
      <style:text-properties officeooo:rsid="00259e25" officeooo:paragraph-rsid="00259e25"/>
    </style:style>
    <style:style style:name="P6" style:family="paragraph" style:parent-style-name="Standard">
      <style:text-properties fo:font-size="15pt" style:text-underline-style="solid" style:text-underline-width="auto" style:text-underline-color="font-color" fo:font-weight="bold" officeooo:rsid="0029d082" officeooo:paragraph-rsid="0029d082" style:font-size-asian="15pt" style:font-weight-asian="bold" style:font-size-complex="15pt" style:font-weight-complex="bold"/>
    </style:style>
    <style:style style:name="P7" style:family="paragraph" style:parent-style-name="Standard">
      <style:text-properties fo:font-size="15pt" style:text-underline-style="none" fo:font-weight="normal" officeooo:rsid="0029d082" officeooo:paragraph-rsid="0029d082"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fo:font-size="15pt" style:text-underline-style="none" fo:font-weight="bold" officeooo:rsid="0029d082" officeooo:paragraph-rsid="0029d082" style:font-size-asian="15pt" style:font-weight-asian="bold" style:font-size-complex="15pt" style:font-weight-complex="bold"/>
    </style:style>
    <style:style style:name="P9" style:family="paragraph" style:parent-style-name="Standard">
      <style:text-properties fo:color="#224b12" loext:opacity="100%" fo:font-size="15pt" style:text-underline-style="none" fo:font-weight="normal" officeooo:rsid="0029d082" officeooo:paragraph-rsid="0029d082" style:font-size-asian="15pt" style:font-weight-asian="normal" style:font-size-complex="15pt" style:font-weight-complex="normal"/>
    </style:style>
    <style:style style:name="P10" style:family="paragraph" style:parent-style-name="Standard">
      <style:text-properties fo:color="#5b277d" loext:opacity="100%" fo:font-size="15pt" style:text-underline-style="none" fo:font-weight="normal" officeooo:rsid="0029d082" officeooo:paragraph-rsid="0029d082"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none" fo:font-weight="bold" officeooo:rsid="002d2aaa" officeooo:paragraph-rsid="002d2aaa" style:font-size-asian="15pt" style:font-weight-asian="bold" style:font-size-complex="15pt" style:font-weight-complex="bold"/>
    </style:style>
    <style:style style:name="P12" style:family="paragraph" style:parent-style-name="Standard">
      <style:paragraph-properties fo:text-align="left" style:justify-single-word="false"/>
      <style:text-properties fo:font-size="15pt" style:text-underline-style="none" fo:font-weight="normal" officeooo:rsid="002d2aaa" officeooo:paragraph-rsid="002d2aaa" style:font-size-asian="15pt" style:font-weight-asian="normal" style:font-size-complex="15pt" style:font-weight-complex="normal"/>
    </style:style>
    <style:style style:name="P13" style:family="paragraph" style:parent-style-name="Standard">
      <style:paragraph-properties fo:text-align="left" style:justify-single-word="false"/>
      <style:text-properties fo:font-size="15pt" style:text-underline-style="none" fo:font-weight="bold" officeooo:rsid="002d2aaa" officeooo:paragraph-rsid="002d2aaa" style:font-size-asian="15pt" style:font-weight-asian="bold" style:font-size-complex="15pt" style:font-weight-complex="bold"/>
    </style:style>
    <style:style style:name="P14" style:family="paragraph" style:parent-style-name="Standard">
      <style:paragraph-properties fo:text-align="left" style:justify-single-word="false"/>
      <style:text-properties fo:font-size="15pt" style:text-underline-style="none" fo:font-weight="normal" officeooo:rsid="002d2aaa" officeooo:paragraph-rsid="0030be72" style:font-size-asian="15pt" style:font-weight-asian="normal" style:font-size-complex="15pt" style:font-weight-complex="normal"/>
    </style:style>
    <style:style style:name="P15" style:family="paragraph" style:parent-style-name="Standard">
      <style:paragraph-properties fo:text-align="left" style:justify-single-word="false"/>
      <style:text-properties fo:font-size="15pt" style:text-underline-style="none" fo:font-weight="bold" officeooo:rsid="0030be72" officeooo:paragraph-rsid="0030be72"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15pt" style:text-underline-style="none" fo:font-weight="bold" officeooo:rsid="002d2aaa" officeooo:paragraph-rsid="002d2aaa" style:font-size-asian="13.1000003814697pt" style:font-weight-asian="bold" style:font-size-complex="15pt" style:font-weight-complex="bold"/>
    </style:style>
    <style:style style:name="P17" style:family="paragraph" style:parent-style-name="Standard">
      <style:paragraph-properties fo:text-align="left" style:justify-single-word="false"/>
      <style:text-properties fo:font-size="15pt" style:text-underline-style="none" fo:font-weight="bold" officeooo:rsid="002d2aaa" officeooo:paragraph-rsid="002d2aaa" style:font-size-asian="13.1000003814697pt" style:font-weight-asian="bold" style:font-size-complex="15pt" style:font-weight-complex="bold"/>
    </style:style>
    <style:style style:name="P18" style:family="paragraph" style:parent-style-name="Standard">
      <style:paragraph-properties fo:text-align="left" style:justify-single-word="false"/>
      <style:text-properties fo:font-size="15pt" style:text-underline-style="none" fo:font-weight="normal" officeooo:rsid="002d2aaa" officeooo:paragraph-rsid="002d2aaa" style:font-size-asian="13.1000003814697pt" style:font-weight-asian="normal" style:font-size-complex="15pt" style:font-weight-complex="normal"/>
    </style:style>
    <style:style style:name="P19" style:family="paragraph" style:parent-style-name="Standard">
      <style:paragraph-properties fo:text-align="left" style:justify-single-word="false"/>
      <style:text-properties fo:font-size="15pt" style:text-underline-style="none" fo:font-weight="bold" officeooo:rsid="0030cf0f" officeooo:paragraph-rsid="0030cf0f" style:font-size-asian="13.1000003814697pt" style:font-weight-asian="bold" style:font-size-complex="15pt" style:font-weight-complex="bold"/>
    </style:style>
    <style:style style:name="P20" style:family="paragraph" style:parent-style-name="Standard">
      <style:paragraph-properties fo:text-align="left" style:justify-single-word="false"/>
      <style:text-properties fo:font-size="15pt" style:text-underline-style="none" fo:font-weight="normal" officeooo:rsid="0034048d" officeooo:paragraph-rsid="0034048d" style:font-size-asian="13.1000003814697pt" style:font-weight-asian="normal" style:font-size-complex="15pt" style:font-weight-complex="normal"/>
    </style:style>
    <style:style style:name="T1" style:family="text">
      <style:text-properties officeooo:rsid="002610ce"/>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5b277d" loext:opacity="100%"/>
    </style:style>
    <style:style style:name="T5" style:family="text">
      <style:text-properties officeooo:rsid="002e9f21"/>
    </style:style>
    <style:style style:name="T6" style:family="text">
      <style:text-properties fo:color="#818898" loext:opacity="100%"/>
    </style:style>
    <style:style style:name="T7" style:family="text">
      <style:text-properties fo:color="#eaecf0" loext:opacity="100%"/>
    </style:style>
    <style:style style:name="T8" style:family="text">
      <style:text-properties fo:color="#d3d7de" loext:opacity="100%"/>
    </style:style>
    <style:style style:name="T9" style:family="text">
      <style:text-properties fo:color="#cc7bf4" loext:opacity="100%"/>
    </style:style>
    <style:style style:name="T10" style:family="text">
      <style:text-properties fo:color="#5eeded"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ich bus is ADC1 on?</text:p>
      <text:p text:style-name="P1">→ The ADCs are mapped on the AHB bus to allow fast data handling</text:p>
      <text:p text:style-name="Standard">→ which RCC register to enable clock</text:p>
      <text:p text:style-name="P1"/>
      <text:p text:style-name="Standard"/>
      <text:p text:style-name="Standard"/>
      <text:p text:style-name="Standard">2. What is the ADC input voltage reference?</text:p>
      <text:p text:style-name="Standard">→ VREF+ determines the max input voltage</text:p>
      <text:p text:style-name="Standard">→ Input, analog reference positive. The higher/positive reference voltage for the</text:p>
      <text:p text:style-name="Standard">ADC.</text:p>
      <text:p text:style-name="Standard"/>
      <text:p text:style-name="Standard">3. What register starts a conversion?</text:p>
      <text:p text:style-name="Standard">→ look for ADSTART bit</text:p>
      <text:p text:style-name="Standard">→ <text:span text:style-name="T1">in ADC_CR, </text:span>Bit 2 ADSTART: ADC start of regular conversion</text:p>
      <text:p text:style-name="Standard">0: No ADC regular conversion is ongoing.</text:p>
      <text:p text:style-name="Standard">1: Write 1 to start regular conversions. Read 1 means that the ADC is operating and eventually</text:p>
      <text:p text:style-name="Standard">converting a regular channel.</text:p>
      <text:p text:style-name="Standard"/>
      <text:p text:style-name="Standard">4. What register holds the result?</text:p>
      <text:p text:style-name="Standard">→ look for ADC_DR (data register)</text:p>
      <text:p text:style-name="Standard"><text:span text:style-name="T1">In ADC_DR register </text:span>Bits 31:0 RDATA[31:0]: Regular Data converted</text:p>
      <text:p text:style-name="Standard">These bits are read-only. They contain the conversion result from the last converted regular channel.</text:p>
      <text:p text:style-name="Standard">The data are left- or right-aligned</text:p>
      <text:p text:style-name="Standard"/>
      <text:p text:style-name="Standard">5. How do you know conversion is complete?</text:p>
      <text:p text:style-name="Standard">→ look for EOC flag (End Of Conversion)</text:p>
      <text:p text:style-name="Text_20_body">→ <text:span text:style-name="T1">Bit 2 in ADC_ISR, End of Conversion Flag. </text:span></text:p>
      <text:p text:style-name="Text_20_body">This bit is set by hardware at the end of each regular conversion of a channel when a new data is available in the ADC_DR register. It is cleared by software writing 1 to it or by reading the ADC_DR register 0: Regular channel conversion not complete (or the flag event was already acknowledged and cleared by software) 1: Regular channel conversion complete</text:p>
      <text:p text:style-name="Standard"/>
      <text:p text:style-name="Standard">6. What is the ADC_CR register?</text:p>
      <text:p text:style-name="Standard">→ <text:span text:style-name="T2">find ADEN bit (ADC enable)</text:span></text:p>
      <text:p text:style-name="Standard">Bit 0 ADEN: ADC enable control</text:p>
      <text:p text:style-name="Standard">This bit is set by software to enable the ADC. The ADC will be effectively ready to operate once the</text:p>
      <text:p text:style-name="Standard">flag ADRDY has been set.</text:p>
      <text:p text:style-name="Standard">It is cleared by hardware when the ADC is disabled, after the execution of the ADDIS command.</text:p>
      <text:p text:style-name="Standard">0: ADC is disabled (OFF state)</text:p>
      <text:p text:style-name="Standard">1: Write 1 to enable the ADC.</text:p>
      <text:p text:style-name="Standard">→<text:span text:style-name="T2"> find ADCAL bit (calibration)</text:span></text:p>
      <text:p text:style-name="Standard">Bit 31 ADCAL: ADC calibration</text:p>
      <text:p text:style-name="Standard">This bit is set by software to start the calibration of the ADC. Program first the bit ADCALDIF to</text:p>
      <text:p text:style-name="Standard">determine if this calibration applies for single-ended or differential inputs mode.</text:p>
      <text:p text:style-name="Standard">It is cleared by hardware after calibration is complete.</text:p>
      <text:p text:style-name="Standard">0: Calibration complete</text:p>
      <text:p text:style-name="Standard">1: Write 1 to calibrate the ADC. Read at 1 means that a calibration in progress.</text:p>
      <text:p text:style-name="Standard"><text:soft-page-break/></text:p>
      <text:p text:style-name="Standard">7. What is sampling time?</text:p>
      <text:p text:style-name="Standard">→ why does it matter for accuracy</text:p>
      <text:p text:style-name="Standard">Before starting a conversion, the ADC must establish a direct connection between the</text:p>
      <text:p text:style-name="Standard">voltage source under measurement and the embedded sampling capacitor of the ADC. This</text:p>
      <text:p text:style-name="Standard">sampling time must be enough for the input voltage source to charge the embedded</text:p>
      <text:p text:style-name="Standard">capacitor to the input voltage level.</text:p>
      <text:p text:style-name="Standard">The total conversion time is calculated as follows:</text:p>
      <text:p text:style-name="Standard">TCONV = Sampling time + 7.5 ADC clock cycles</text:p>
      <text:p text:style-name="Standard"/>
      <text:p text:style-name="Standard">8. Which register configures the input channel?</text:p>
      <text:p text:style-name="Standard">→ look for ADC_SQR1 (sequence register)</text:p>
      <text:p text:style-name="Standard"/>
      <text:p text:style-name="Standard"/>
      <text:p text:style-name="Standard"/>
      <text:p text:style-name="Standard">The result of the ADC is stored in a left-aligned or right-aligned 32-bit data register.</text:p>
      <text:p text:style-name="Standard">The ADCs are mapped on the AHB bus to allow fast data handling.</text:p>
      <text:p text:style-name="Standard">ADC conversion time is independent from the AHB bus clock frequency</text:p>
      <text:p text:style-name="P2">ADC input range: VREF– ≤ VIN ≤ VREF+</text:p>
      <text:p text:style-name="Text_20_body">adc_ker_ck_input → ADC kernel clock input from RCC, which is independent and asynchronous with the AHB clock. CKMODE[1:0] bits of the ADCx_CCR register must be reset.</text:p>
      <text:p text:style-name="Text_20_body">ADEN=1 enables the ADC. The flag ADRDY will be set once the ADC is ready for operation.</text:p>
      <text:p text:style-name="Text_20_body">ADDIS=1 disables the ADC. ADEN and ADDIS are then automatically cleared by hardware as soon as the analog ADC is effectively disabled.</text:p>
      <text:p text:style-name="Standard">Regular conversion can then start either by setting ADSTART=1.</text:p>
      <text:p text:style-name="Standard"/>
      <text:p text:style-name="P3">Software procedure to enable the ADC</text:p>
      <text:p text:style-name="P3"/>
      <text:p text:style-name="Standard">1. Clear the ADRDY bit in the ADC_ISR register by writing ‘1’.</text:p>
      <text:p text:style-name="Standard">2. Set ADEN=1.</text:p>
      <text:p text:style-name="Standard">3. Wait until ADRDY=1 (ADRDY is set after the ADC startup time). This can be done</text:p>
      <text:p text:style-name="Standard">using the associated interrupt (setting ADRDYIE=1).</text:p>
      <text:p text:style-name="Standard">4. Clear the ADRDY bit in the ADC_ISR register by writing ‘1’ (optional).</text:p>
      <text:p text:style-name="Standard"/>
      <text:p text:style-name="P3">Software procedure to disable the ADC</text:p>
      <text:p text:style-name="P3"/>
      <text:p text:style-name="P4">1. Check that both ADSTART=0 and JADSTART=0 to ensure that no conversion is</text:p>
      <text:p text:style-name="P4">ongoing. If required, stop any regular and injected conversion ongoing by setting</text:p>
      <text:p text:style-name="P4">ADSTP=1 and JADSTP=1 and then wait until ADSTP=0 and JADSTP=0.</text:p>
      <text:p text:style-name="P4">2. Set ADDIS=1.</text:p>
      <text:p text:style-name="P4">3. If required by the application, wait until ADEN=0, until the analog ADC is effectively</text:p>
      <text:p text:style-name="P4">disabled (ADDIS will automatically be reset once ADEN=0).</text:p>
      <text:p text:style-name="P4"/>
      <text:p text:style-name="P4"><draw:frame draw:style-name="fr1" draw:name="Image1" text:anchor-type="char" svg:width="6.9252in" svg:height="3.1992in" draw:z-index="0"><draw:image xlink:href="Pictures/1000000100000445000001F950068914.png" xlink:type="simple" xlink:show="embed" xlink:actuate="onLoad" draw:mime-type="image/png"/></draw:frame><text:soft-page-break/><text:s text:c="166"/></text:p>
      <text:p text:style-name="P4"/>
      <text:p text:style-name="P5">* If ADC is disabled, then the following bits can be written: </text:p>
      <text:p text:style-name="P5"><text:tab/>1. <text:s/>RCC control bits to configure and enable the ADC clock</text:p>
      <text:p text:style-name="P5"><text:tab/>2. the control bits DIFSEL in the ADC_DIFSEL register,</text:p>
      <text:p text:style-name="P5"><text:tab/>3. <text:s/>ADCx_CCR register and the control bits ADCAL and ADEN in the ADC_CR register</text:p>
      <text:p text:style-name="P5"/>
      <text:p text:style-name="P5">* If ADC is enabled, then the following bits are allowed to written:</text:p>
      <text:p text:style-name="P5">ADSTART, JADSTART, and ADDIS</text:p>
      <text:p text:style-name="P5"/>
      <text:p text:style-name="P5"/>
      <text:p text:style-name="P6">Startup Sequence for implementing ADC in STm32:<text:span text:style-name="T3"/></text:p>
      <text:p text:style-name="P7"/>
      <text:p text:style-name="P8">Step1: Exit deep power down</text:p>
      <text:p text:style-name="P7"/>
      <text:p text:style-name="P7">By default, the ADC is in deep-power-down mode where its supply is internally switched off to reduce the leakage currents (the reset state of bit DEEPPWD is 1 in the ADC_CR register). To start ADC operations, it is first needed to exit deep-power-down mode by clearing bit <text:span text:style-name="T2">DEEPPWD=0</text:span>.</text:p>
      <text:p text:style-name="P7"/>
      <text:p text:style-name="P7">Then, it is mandatory to enable the ADC internal voltage regulator by setting the bit <text:span text:style-name="T2">ADVREGEN=1</text:span> into ADC_CR register. The software must wait for the startup time of the ADC voltage regulator (TADCVREG_STUP) before launching a calibration or enabling the ADC. </text:p>
      <text:p text:style-name="P7"/>
      <text:p text:style-name="P9"><text:tab/><text:span text:style-name="T4">ADC1→CR &amp;= ~ADC_CR_DEEPPWD</text:span></text:p>
      <text:p text:style-name="P10"><text:tab/>ADC1→CR <text:s/>|= ADC_CR_ADVREGEN</text:p>
      <text:p text:style-name="P10"><text:tab/>delay_us(10) // TADCVREG_SETUP</text:p>
      <text:p text:style-name="P11"><text:soft-page-break/>Step 2: Calibration</text:p>
      <text:p text:style-name="P12">The calibration is preliminary to any ADC operation. It removes the systematic errors which may vary from chip to chip and allows to compensate offset and linearity deviatio<text:span text:style-name="T5">n. The calibration is then initiated by software by setting bit ADCAL=1. It can be initiated only </text:span>when the <text:span text:style-name="T2">ADC is disabled (when ADEN=0).</text:span></text:p>
      <text:p text:style-name="P12">It is recommended to recalibrate when VREF+ voltage changed more than 10%.</text:p>
      <text:p text:style-name="P12"/>
      <text:p text:style-name="P13">Software procedure to calibrate the ADC:</text:p>
      <text:p text:style-name="P14">1.Ensure DEEPPWD=0, ADVREGEN=1 and verify that the ADC voltage regulator startup time has elapsed by checking the LDORDY bit in ADC_ISR.</text:p>
      <text:p text:style-name="P14">2. Ensure that ADEN=0.</text:p>
      <text:p text:style-name="P12">3. Select the input mode for this calibration by setting ADCALDIF=0 (Single-ended input) or ADCALDIF=1 (Differential input). Select if Linearity calibration enable or not by ADCALLIN=1(enabled) or ADCALLIN=0(disabled).</text:p>
      <text:p text:style-name="P12">4. Set ADCAL=1.</text:p>
      <text:p text:style-name="P12">5. Wait until ADCAL=0.</text:p>
      <text:p text:style-name="P12">6. The offset calibration factor can be read from ADC_CALFACT register.</text:p>
      <text:p text:style-name="P12">7. The linearity calibration factor can be read from ADC_CALFACT2 register, following the procedure described in Section : Linearity calibration reading procedure (ADEN must be set to 1 prior to accessing ADC_CALFACT2 register).</text:p>
      <text:p text:style-name="P12"/>
      <text:p text:style-name="P15">Codes: </text:p>
      <text:p text:style-name="P14"><text:span text:style-name="T6">// Step 2 — Calibration</text:span> <text:span text:style-name="T6">// ADEN must be 0 (default after reset, so we are fine)</text:span> <text:span text:style-name="T6">// Single-ended mode → ADCALDIF = 0 (already 0 by default)</text:span> ADC1<text:span text:style-name="T7">-&gt;</text:span>CR <text:span text:style-name="T7">&amp;=</text:span> ADC_CR_ADCALDIF<text:span text:style-name="T8">;</text:span> <text:span text:style-name="T6">// single-ended calibration</text:span> ADC1<text:span text:style-name="T7">-&gt;</text:span>CR <text:span text:style-name="T7">|=</text:span> ADC_CR_ADCAL<text:span text:style-name="T8">;</text:span> <text:span text:style-name="T6">// start calibration</text:span> <text:span text:style-name="T6">// Wait for hardware to clear ADCAL</text:span></text:p>
      <text:p text:style-name="P14"><text:span text:style-name="T9">while</text:span> <text:span text:style-name="T8">(</text:span>ADC1<text:span text:style-name="T7">-&gt;</text:span>CR <text:span text:style-name="T7">&amp;</text:span> ADC_CR_ADCAL<text:span text:style-name="T8">);</text:span></text:p>
      <text:p text:style-name="P12"/>
      <text:p text:style-name="P16">Step 3: Enable ADC (ADEN)</text:p>
      <text:p text:style-name="P17">Software procedure to enable the ADC:</text:p>
      <text:p text:style-name="P18">1. Clear the ADRDY bit in the ADC_ISR register by writing ‘1’.</text:p>
      <text:p text:style-name="P18">2. Set ADEN=1.</text:p>
      <text:p text:style-name="P18">3. Wait until ADRDY=1 (ADRDY is set after the ADC startup time). This can be done using the associated interrupt (setting ADRDYIE=1).</text:p>
      <text:p text:style-name="P18">4. Clear the ADRDY bit in the ADC_ISR register by writing ‘1’ (optional).</text:p>
      <text:p text:style-name="P19"/>
      <text:p text:style-name="P19"/>
      <text:p text:style-name="P19"/>
      <text:p text:style-name="P19"/>
      <text:p text:style-name="P19"><text:soft-page-break/>Code:</text:p>
      <text:p text:style-name="P19"><text:span text:style-name="T6">// Step 3 — Enable ADC</text:span></text:p>
      <text:p text:style-name="P19">ADC1<text:span text:style-name="T7">-&gt;</text:span>CR <text:span text:style-name="T7">|=</text:span> ADC_CR_ADEN<text:span text:style-name="T8">;</text:span></text:p>
      <text:p text:style-name="P19"><text:span text:style-name="T6">// Wait until ADC is ready</text:span></text:p>
      <text:p text:style-name="P19"><text:span text:style-name="T9">while</text:span> <text:span text:style-name="T8">(</text:span><text:span text:style-name="T7">!</text:span><text:span text:style-name="T8">(</text:span>ADC1<text:span text:style-name="T7">-&gt;</text:span>ISR <text:span text:style-name="T7">&amp;</text:span> ADC_ISR_ADRDY<text:span text:style-name="T8">));</text:span></text:p>
      <text:p text:style-name="P19"><text:span text:style-name="T6">// Clear ADRDY flag by writing 1 to it</text:span></text:p>
      <text:p text:style-name="P19">ADC1<text:span text:style-name="T7">-&gt;</text:span>ISR <text:span text:style-name="T7">|=</text:span> ADC_ISR_ADRDY<text:span text:style-name="T8">;</text:span></text:p>
      <text:p text:style-name="P16">Step 4: Configure Channel and sampling time</text:p>
      <text:p text:style-name="P18">Before starting a conversion, the ADC must establish a direct connection between the voltage source under measurement and the embedded sampling capacitor of the ADC. This sampling time must be enough for the input voltage source to charge the embedded capacitor to the input voltage level.</text:p>
      <text:p text:style-name="P20">Codes:</text:p>
      <text:p text:style-name="P20"><text:span text:style-name="T6">// Step 4 — Configure channel and sampling time</text:span></text:p>
      <text:p text:style-name="P20"><text:span text:style-name="T6">// SQR1: 1 conversion, channel 15 first</text:span></text:p>
      <text:p text:style-name="P20">ADC1<text:span text:style-name="T7">-&gt;</text:span>SQR1 <text:span text:style-name="T7">=</text:span> <text:span text:style-name="T8">(</text:span><text:span text:style-name="T10">15</text:span> <text:span text:style-name="T7">&lt;&lt;</text:span> <text:span text:style-name="T10">6</text:span><text:span text:style-name="T8">);</text:span></text:p>
      <text:p text:style-name="P20"><text:span text:style-name="T6">// SMPR2: 64.5 cycles for channel 15 (bits 17:15)</text:span></text:p>
      <text:p text:style-name="P20">ADC1<text:span text:style-name="T7">-&gt;</text:span>SMPR2 <text:span text:style-name="T7">=</text:span> <text:span text:style-name="T8">(</text:span><text:span text:style-name="T10">0</text:span>b011 <text:span text:style-name="T7">&lt;&lt;</text:span> <text:span text:style-name="T10">15</text:span><text:span text:style-name="T8">);</text:span></text:p>
      <text:p text:style-name="P16">Step 5: Start Conversion (ADSTART)</text:p>
      <text:p text:style-name="P16">Step 6: Poll EOC, read ADC_D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1T20:59:07.125544262</meta:creation-date>
    <meta:generator>LibreOffice/26.2.4.2$Linux_X86_64 LibreOffice_project/620$Build-2</meta:generator>
    <dc:date>2026-07-04T20:30:57.111001650</dc:date>
    <meta:editing-duration>PT7H10M4S</meta:editing-duration>
    <meta:editing-cycles>13</meta:editing-cycles>
    <meta:document-statistic meta:table-count="0" meta:image-count="1" meta:object-count="0" meta:page-count="5" meta:paragraph-count="119" meta:word-count="1298" meta:character-count="7853" meta:non-whitespace-character-count="6490"/>
  </office:meta>
</office:document-meta>
</file>